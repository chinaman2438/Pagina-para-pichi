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TC" svg:font-family="'Noto Sans TC'"/>
  </office:font-face-decls>
  <office:automatic-styles>
    <style:style style:name="P1" style:family="paragraph" style:parent-style-name="Standard">
      <style:text-properties officeooo:rsid="00032d65" officeooo:paragraph-rsid="00032d65"/>
    </style:style>
    <style:style style:name="P2" style:family="paragraph" style:parent-style-name="Standard">
      <style:text-properties officeooo:paragraph-rsid="00032d65"/>
    </style:style>
    <style:style style:name="P3" style:family="paragraph" style:parent-style-name="Text_20_body">
      <style:text-properties officeooo:paragraph-rsid="00032d65"/>
    </style:style>
    <style:style style:name="P4" style:family="paragraph" style:parent-style-name="Text_20_body">
      <style:text-properties officeooo:rsid="00032d65" officeooo:paragraph-rsid="00032d65"/>
    </style:style>
    <style:style style:name="T1" style:family="text">
      <style:text-properties officeooo:rsid="00032d65"/>
    </style:style>
    <style:style style:name="T2" style:family="text">
      <style:text-properties fo:font-variant="normal" fo:text-transform="none" fo:color="#000000" loext:opacity="100%" style:font-name="Arial" fo:font-size="12.75pt" fo:letter-spacing="normal" fo:font-style="normal" fo:font-weight="normal" officeooo:rsid="00032d65"/>
    </style:style>
    <style:style style:name="T3" style:family="text">
      <style:text-properties fo:font-variant="normal" fo:text-transform="none" fo:color="#000000" loext:opacity="100%" style:font-name="Arial" fo:font-size="12.75pt" fo:letter-spacing="normal" fo:font-style="normal" fo:font-weight="normal" officeooo:rsid="00032d65" loext:padding="0cm" loext:border="none"/>
    </style:style>
    <style:style style:name="T4" style:family="text">
      <style:text-properties fo:font-variant="normal" fo:text-transform="none" fo:color="#000000" loext:opacity="100%" style:font-name="Arial" fo:font-size="12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6b6b6b" loext:opacity="100%" style:font-name="Arial" fo:font-size="12.75pt" fo:letter-spacing="normal" fo:font-style="normal" fo:font-weight="normal"/>
    </style:style>
    <style:style style:name="T6" style:family="text">
      <style:text-properties fo:font-variant="normal" fo:text-transform="none" fo:color="#6b6b6b" loext:opacity="100%" style:font-name="Arial" fo:font-size="12.75pt" fo:letter-spacing="normal" fo:font-style="normal" fo:font-weight="normal" officeooo:rsid="00032d65"/>
    </style:style>
    <style:style style:name="T7" style:family="text">
      <style:text-properties fo:font-variant="normal" fo:text-transform="none" fo:color="#2a2a2a" loext:opacity="100%" style:font-name="Arial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/></text:p>
      <text:p text:style-name="P3"><text:span text:style-name="T1">Correct the Special characters in the product description, almost all of them have problems with ‘acentos’.</text:span></text:p>
      <text:p text:style-name="P3"><text:span text:style-name="T1">Certificaciones are still showing in black and white, have them show in their original color.</text:span></text:p>
      <text:p text:style-name="P3"><text:span text:style-name="T1">Remove the distri-med logo at the bottom of the page. Instead, put the logo where it says distrimed at the bottom of the page (to the left of “Catalogo rapido”</text:span><text:line-break/></text:p>
      <text:p text:style-name="Text_20_body"><text:span text:style-name="T1">Have the menu color fade out (like it does at the beggining) when it scrolls down to the nosotros section</text:span><text:line-break/></text:p>
      <text:p text:style-name="P3"><text:span text:style-name="T1">Instead of soluciones que transforman resultados, </text:span><text:span text:style-name="T5">Somos el único importador en territorio Mexicano de productos Osteonic, </text:span><text:span text:style-name="T6">put only “Productos de la mas alta calidad”</text:span></text:p>
      <text:p text:style-name="P3"><text:span text:style-name="T2">In the hero page instead of </text:span><text:span text:style-name="T4">Único importador en México </text:span><text:span text:style-name="T3">put “Único importador de Osteonic en México”</text:span><text:span text:style-name="T5"><text:line-break/> </text:span></text:p>
      <text:p text:style-name="P4"><text:span text:style-name="T5">Put the logo of distri-med of the menu more to the left</text:span></text:p>
      <text:p text:style-name="Text_20_body"><text:span text:style-name="T1">Evenly space out the three logos at the bottom of the hero page in the assigned white space</text:span><text:line-break/></text:p>
      <text:p text:style-name="Text_20_body"><text:line-break/></text:p>
      <text:p text:style-name="Text_20_body"><text:line-break/></text:p>
      <text:p text:style-name="P2"><text:span text:style-name="T7"/></text:p>
      <text:p text:style-name="P2"><text:span text:style-name="T7"/></text:p>
      <text:p text:style-name="P2"><text:span text:style-name="T7"/></text:p>
      <text:p text:style-name="P1"><text:span text:style-name="T7"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TC" svg:font-family="'Noto Sans TC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1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3T10:24:50.777000000</meta:creation-date>
    <dc:date>2026-02-23T21:05:33.868000000</dc:date>
    <meta:editing-duration>PT10H40M44S</meta:editing-duration>
    <meta:editing-cycles>1</meta:editing-cycles>
    <meta:document-statistic meta:table-count="0" meta:image-count="0" meta:object-count="0" meta:page-count="1" meta:paragraph-count="10" meta:word-count="152" meta:character-count="881" meta:non-whitespace-character-count="730"/>
    <meta:generator>LibreOffice/7.4.1.2$Windows_X86_64 LibreOffice_project/3c58a8f3a960df8bc8fd77b461821e42c061c5f0</meta:generator>
  </office:meta>
</office:document-meta>
</file>